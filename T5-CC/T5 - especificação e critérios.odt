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line-height="115%" fo:text-align="center" style:justify-single-word="false" fo:orphans="0" fo:widows="0"/>
    </style:style>
    <style:style style:name="P2" style:family="paragraph" style:parent-style-name="Standard">
      <style:paragraph-properties fo:line-height="115%" fo:text-align="justify" style:justify-single-word="false" fo:orphans="0" fo:widows="0"/>
    </style:style>
    <style:style style:name="P3" style:family="paragraph" style:parent-style-name="Standard">
      <style:paragraph-properties fo:line-height="115%" fo:text-align="justify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justify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line-height="115%" fo:text-align="justify" style:justify-single-word="false" fo:orphans="0" fo:widows="0"/>
      <style:text-properties style:font-name="Courier New" fo:font-size="8pt" style:font-name-asian="Courier New1" style:font-size-asian="8pt" style:font-name-complex="Courier New1" style:font-size-complex="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5in" fo:margin-right="0in" fo:line-height="115%" fo:text-align="justify" style:justify-single-word="false" fo:orphans="0" fo:widows="0" fo:text-indent="0in" style:auto-text-indent="false"/>
    </style:style>
    <style:style style:name="P8" style:family="paragraph" style:parent-style-name="Standard">
      <style:paragraph-properties fo:margin-left="0in" fo:margin-right="0in" fo:line-height="115%" fo:text-align="justify" style:justify-single-word="false" fo:orphans="0" fo:widows="0" fo:text-indent="0.5in" style:auto-text-indent="false"/>
    </style:style>
    <style:style style:name="P9" style:family="paragraph" style:parent-style-name="Standard">
      <style:paragraph-properties fo:line-height="115%" fo:text-align="center" style:justify-single-word="false" fo:orphans="0" fo:widows="0" fo:break-before="page"/>
    </style:style>
    <style:style style:name="P10" style:family="paragraph" style:parent-style-name="Standard">
      <style:paragraph-properties fo:margin-left="1.3752in" fo:margin-right="0in" fo:line-height="115%" fo:text-align="justify" style:justify-single-word="false" fo:orphans="0" fo:widows="0" fo:text-indent="-0.8752in" style:auto-text-indent="false"/>
    </style:style>
    <style:style style:name="P11" style:family="paragraph" style:parent-style-name="Standard" style:master-page-name="Standard">
      <style:paragraph-properties fo:line-height="115%" fo:text-align="center" style:justify-single-word="false" fo:orphans="0" fo:widows="0" style:page-number="1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5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6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Construção de Compiladores</text:span></text:p>
      <text:p text:style-name="P1"><text:span text:style-name="T1">Daniel Lucrédio</text:span></text:p>
      <text:p text:style-name="P1"><text:span text:style-name="T1">Especificação e Critérios de notas do Trabalho 5</text:span></text:p>
      <text:p text:style-name="P1"><text:span text:style-name="T1">(Última revisão: mar/2026)</text:span></text:p>
      <text:p text:style-name="P3"/>
      <text:p text:style-name="P2"><text:span text:style-name="T2">O trabalho 5 (T5) da disciplina consiste em implementar um gerador de código para a linguagem LA (Linguagem Algorítmica) desenvolvida pelo prof. Jander, no âmbito do DC/UFSCar. O gerador de código deverá produzir código executável em C equivalente ao programa de entrada. Exemplo:</text:span></text:p>
      <text:p text:style-name="P4"/>
      <text:p text:style-name="P2"><text:span text:style-name="T2">Entrada:</text:span></text:p>
      <text:p text:style-name="P2"><text:span text:style-name="T4">algoritmo</text:span></text:p>
      <text:p text:style-name="P2"><text:span text:style-name="T4"><text:s text:c="2"/>declare</text:span></text:p>
      <text:p text:style-name="P2"><text:span text:style-name="T4"><text:s text:c="4"/>x: literal</text:span></text:p>
      <text:p text:style-name="P2"><text:span text:style-name="T4"><text:s text:c="2"/>leia(x)</text:span></text:p>
      <text:p text:style-name="P2"><text:span text:style-name="T4"><text:s text:c="2"/>escreva(x)</text:span></text:p>
      <text:p text:style-name="P2"><text:span text:style-name="T4">fim_algoritmo</text:span></text:p>
      <text:p text:style-name="P5"/>
      <text:p text:style-name="P2"><text:span text:style-name="T2">Saída produzida:</text:span></text:p>
      <text:p text:style-name="P2"><text:span text:style-name="T4">#include &lt;stdio.h&gt;</text:span></text:p>
      <text:p text:style-name="P2"><text:span text:style-name="T4">#include &lt;stdlib.h&gt;</text:span></text:p>
      <text:p text:style-name="P2"><text:span text:style-name="T4">int main() {</text:span></text:p>
      <text:p text:style-name="P2"><text:span text:style-name="T4"><text:tab/>char x[80];</text:span></text:p>
      <text:p text:style-name="P2"><text:span text:style-name="T4"><text:tab/>gets(x);</text:span></text:p>
      <text:p text:style-name="P2"><text:span text:style-name="T4"><text:tab/>printf("%s",x);</text:span></text:p>
      <text:p text:style-name="P2"><text:span text:style-name="T4"><text:tab/>return 0;</text:span></text:p>
      <text:p text:style-name="P2"><text:span text:style-name="T4">}</text:span></text:p>
      <text:p text:style-name="P5"/>
      <text:p text:style-name="P2"><text:soft-page-break/><text:span text:style-name="T2">IMPORTANTE: o código gerado não precisa ser idêntico ao fornecido nos casos de teste, mas ele deve ser compilável usando GCC, e sua EXECUÇÃO deve ser a mesma que a dos casos de teste. O corretor automático irá compilar o código gerado (usando GCC), executá-lo e comparar a entrada/saída com o que é esperado.</text:span></text:p>
      <text:p text:style-name="P4"/>
      <text:p text:style-name="P2"><text:span text:style-name="T1">Juntando o analisador semântico com o gerador de código em um único executável</text:span></text:p>
      <text:p text:style-name="P4"/>
      <text:p text:style-name="P2"><text:span text:style-name="T2">A saída do executável final, que irá combinar analisador léxico+sintático+semântico+gerador, depende da entrada:</text:span></text:p>
      <text:p text:style-name="P7"><text:span text:style-name="T2">- Se a entrada tiver algum erro (léxico ou sintático ou semântico) a saída deve conter a descrição dos erros;</text:span></text:p>
      <text:p text:style-name="P7"><text:span text:style-name="T2">- Se a entrada não tiver nenhum erro, a saída deve conter o código gerado.</text:span></text:p>
      <text:p text:style-name="P4"/>
      <text:p text:style-name="P2"><text:span text:style-name="T2">O compilador deve poder ser executado em linha de comando (windows, mac ou linux), com DOIS ARGUMENTOS OBRIGATORIAMENTE:</text:span></text:p>
      <text:p text:style-name="P8"><text:span text:style-name="T2">Argumento 1: arquivo de entrada (caminho completo)</text:span></text:p>
      <text:p text:style-name="P8"><text:span text:style-name="T2">Argumento 2: arquivo de saída (caminho completo)</text:span></text:p>
      <text:p text:style-name="P4"/>
      <text:p text:style-name="P2"><text:span text:style-name="T2">Exemplo de como seu compilador deve rodar:</text:span></text:p>
      <text:p text:style-name="P4"/>
      <text:p text:style-name="P2"><text:span text:style-name="T4">c:\java -jar c:\compilador\meu-compilador.jar c:\casos-de-teste\arquivo1.txt c:\temp\saida.txt</text:span></text:p>
      <text:p text:style-name="P4"/>
      <text:p text:style-name="P2"><text:span text:style-name="T2">Como resultado, seu compilador deve ler a entrada de </text:span><text:span text:style-name="T5">c:\casos-de-teste\arquivo1.txt</text:span><text:span text:style-name="T2"> e salvar a saída no arquivo </text:span><text:span text:style-name="T5">c:\temp\saida.txt</text:span></text:p>
      <text:p text:style-name="P4"/>
      <text:p text:style-name="P2"><text:span text:style-name="T2">NÃO SERÃO ACEITOS programas que imprimem a saída no terminal. É obrigatório salvar no arquivo.</text:span></text:p>
      <text:p text:style-name="P3"/>
      <text:p text:style-name="P9"><text:span text:style-name="T1">Critérios de avaliação do Trabalho 5 e descontos nas notas</text:span></text:p>
      <text:p text:style-name="P4"/>
      <text:p text:style-name="P2"><text:span text:style-name="T2">O trabalho 5 deve ser desenvolvido em </text:span><text:span text:style-name="T3">grupos de até 3 estudantes</text:span><text:span text:style-name="T2"> (máximo). A nota do trabalho 5 será composta de 3 parcelas, cada uma valendo de 0 a 10, e com os pesos assim distribuídos:</text:span></text:p>
      <text:p text:style-name="P4"/>
      <text:p text:style-name="P2"><text:span text:style-name="T2">DE - Documentação externa: 10%</text:span></text:p>
      <text:p text:style-name="P2"><text:span text:style-name="T2">DI - Documentação interna: 10%</text:span></text:p>
      <text:p text:style-name="P2"><text:span text:style-name="T2">CT5 - Casos de teste sem erros (geração de código): 80%</text:span></text:p>
      <text:p text:style-name="P4"/>
      <text:p text:style-name="P2"><text:span text:style-name="T1">DE - Documentação externa: </text:span><text:span text:style-name="T2">deve ser fornecido um arquivo de ajuda, para possibilitar que qualquer pessoa consiga compilar e executar seu trabalho. Deve incluir programas que precisam ser instalados, suas respectivas versões, configurações necessárias, e os passos de execução.</text:span></text:p>
      <text:p text:style-name="P2"><text:span text:style-name="T2"><text:tab/>Exemplos de erros comuns na documentação externa e que causarão desconto na nota:</text:span></text:p>
      <text:p text:style-name="P10"><text:span text:style-name="T1">- </text:span><text:span text:style-name="T2">Só diz como executar, mas não como compilar o programa, ou vice-versa</text:span></text:p>
      <text:p text:style-name="P10"><text:span text:style-name="T1">- </text:span><text:span text:style-name="T2">Nada foi dito sobre como compilar/interpretar o programa e executá-lo</text:span></text:p>
      <text:p text:style-name="P10"><text:span text:style-name="T1">- </text:span><text:span text:style-name="T2">Ausência da documentação externa </text:span></text:p>
      <text:p text:style-name="P4"/>
      <text:p text:style-name="P2"><text:span text:style-name="T1">DI - Documentação interna: </text:span><text:span text:style-name="T2">o código-fonte (gramática + demais arquivos) devem ser documentados a ponto de possibilitar seu entendimento por parte de outros programadores olhando seu código. Insira comentários explicativos em todos os pontos relevantes do seu código. Nomes de variáveis e funções também fazem parte da documentação interna.</text:span></text:p>
      <text:p text:style-name="P2"><text:span text:style-name="T2"><text:tab/>Exemplos de erros comuns na documentação interna e que causarão desconto na nota:</text:span></text:p>
      <text:p text:style-name="P10"><text:span text:style-name="T1">- </text:span><text:span text:style-name="T2">Pouco documentado (sem explicação do propósito das regras léxicas, sintáticas, semânticas e geração de código, entrada, saída, descrição das variáveis, etc.)</text:span></text:p>
      <text:p text:style-name="P10"><text:span text:style-name="T1">- </text:span><text:span text:style-name="T2">Descuido nos comentários ou nomes de funções/variáveis pouco indicativos</text:span></text:p>
      <text:p text:style-name="P10"><text:span text:style-name="T1">- </text:span><text:span text:style-name="T2">Ausência de comentários sobre o processo de compilação</text:span></text:p>
      <text:p text:style-name="P10"><text:span text:style-name="T1">- </text:span><text:span text:style-name="T2">Nenhuma linha de documentação relevante</text:span></text:p>
      <text:p text:style-name="P4"/>
      <text:p text:style-name="P2"><text:span text:style-name="T1">CT5 - Casos de teste sem erros (geração de código):</text:span><text:span text:style-name="T2"> o compilador deve produzir código C compilável. O código gerado não precisa ser idêntico ao fornecido nos casos de teste, mas sua execução (mapeamento entrada-saída) deve ser idêntica à fornecida nos casos de teste. São </text:span><text:span text:style-name="T6">20 casos de teste</text:span><text:span text:style-name="T2"> nesta categoria.</text:span></text:p>
      <text:p text:style-name="Standard"/>
      <text:p text:style-name="P1"><text:span text:style-name="T1">Forma de entrega</text:span></text:p>
      <text:p text:style-name="P4"/>
      <text:p text:style-name="P2"><text:span text:style-name="T2">O trabalho deverá ser desenvolvido no GitHub (ou GitLab, ou similar) de forma </text:span><text:span text:style-name="T3">pública</text:span><text:span text:style-name="T2">. Caso algum aluno não queira colocar de forma pública, configurar o repositório como privado e adicionar o professor para ter acesso. No entanto, recomenda-se deixar público para que este projeto faça parte do portfolio do aluno no curso.</text:span></text:p>
      <text:p text:style-name="P4"><text:soft-page-break/></text:p>
      <text:p text:style-name="P2"><text:span text:style-name="T2">De preferência, já preparem o repositório para incluir do T1 ao T5, para facilitar a organização. O T6 deverá ter um repositório separado.</text:span></text:p>
      <text:p text:style-name="P4"/>
      <text:p text:style-name="P2"><text:span text:style-name="T2">Coloque a documentação externa em um arquivo README.md (padrão do GitHub), seguindo o formato Markdown (</text:span><text:a xlink:type="simple" xlink:href="https://www.markdownguide.org/basic-syntax/" text:style-name="ListLabel_20_1" text:visited-style-name="ListLabel_20_1"><text:span text:style-name="T7">https://www.markdownguide.org/basic-syntax/</text:span></text:a><text:span text:style-name="T2">).</text:span></text:p>
      <text:p text:style-name="P4"/>
      <text:p text:style-name="P2"><text:span text:style-name="T2">Não esqueça de incluir na documentação externa os membros do grupo que desenvolveram o trabalho.</text:span></text:p>
      <text:p text:style-name="P4"/>
      <text:p text:style-name="P6"><text:span text:style-name="T2">Para entregar ao professor, basta que </text:span><text:span text:style-name="T3">um membro do grupo</text:span><text:span text:style-name="T2"> informe o link do repositório na respectiva atividade do AVA, em forma de comentário na atividade de entreg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6" meta:word-count="719" meta:character-count="4681" meta:non-whitespace-character-count="4001"/>
    <meta:generator>LibreOfficeDev/6.0.5.2$Linux_X86_64 LibreOffice_project/</meta:generator>
  </office:meta>
</office:document-meta>
</file>